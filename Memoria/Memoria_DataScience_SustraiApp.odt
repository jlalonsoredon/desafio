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00000024C962F25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67cm" fo:margin-left="0.06cm" fo:margin-right="0.191cm" fo:margin-top="0cm" fo:margin-bottom="0cm" table:align="margins"/>
    </style:style>
    <style:style style:name="Tabla1.A" style:family="table-column">
      <style:table-column-properties style:column-width="1.868cm" style:rel-column-width="7811*"/>
    </style:style>
    <style:style style:name="Tabla1.B" style:family="table-column">
      <style:table-column-properties style:column-width="13.802cm" style:rel-column-width="57724*"/>
    </style:style>
    <style:style style:name="Tabla1.1" style:family="table-row">
      <style:table-row-properties style:keep-together="true" fo:keep-together="auto"/>
    </style:style>
    <style:style style:name="Tabla1.A1" style:family="table-cell">
      <style:table-cell-properties style:vertical-align="middle" fo:background-color="#7a3b2e" fo:padding-left="0.191cm" fo:padding-right="0.191cm" fo:padding-top="0cm" fo:padding-bottom="0cm" fo:border="0.002cm solid #e0d5ce">
        <style:background-image/>
      </style:table-cell-properties>
    </style:style>
    <style:style style:name="Tabla1.A2" style:family="table-cell">
      <style:table-cell-properties style:vertical-align="middle" fo:padding-left="0.191cm" fo:padding-right="0.191cm" fo:padding-top="0cm" fo:padding-bottom="0cm" fo:border="0.002cm solid #e0d5ce"/>
    </style:style>
    <style:style style:name="Tabla2" style:family="table">
      <style:table-properties style:width="15.686cm" fo:margin-left="0.044cm" fo:margin-right="0.191cm" fo:margin-top="0cm" fo:margin-bottom="0cm" table:align="margins"/>
    </style:style>
    <style:style style:name="Tabla2.A" style:family="table-column">
      <style:table-column-properties style:column-width="5.059cm" style:rel-column-width="21135*"/>
    </style:style>
    <style:style style:name="Tabla2.B" style:family="table-column">
      <style:table-column-properties style:column-width="7.096cm" style:rel-column-width="29646*"/>
    </style:style>
    <style:style style:name="Tabla2.C" style:family="table-column">
      <style:table-column-properties style:column-width="3.531cm" style:rel-column-width="14754*"/>
    </style:style>
    <style:style style:name="Tabla2.1" style:family="table-row">
      <style:table-row-properties style:keep-together="true" fo:keep-together="auto"/>
    </style:style>
    <style:style style:name="Tabla2.A1" style:family="table-cell">
      <style:table-cell-properties style:vertical-align="middle" fo:background-color="#7a3b2e" fo:padding-left="0.191cm" fo:padding-right="0.191cm" fo:padding-top="0cm" fo:padding-bottom="0cm" fo:border="0.002cm solid #e0d5ce">
        <style:background-image/>
      </style:table-cell-properties>
    </style:style>
    <style:style style:name="Tabla2.A2" style:family="table-cell">
      <style:table-cell-properties style:vertical-align="middle" fo:padding-left="0.191cm" fo:padding-right="0.191cm" fo:padding-top="0cm" fo:padding-bottom="0cm" fo:border="0.002cm solid #e0d5ce"/>
    </style:style>
    <style:style style:name="Tabla3" style:family="table">
      <style:table-properties style:width="15.609cm" fo:margin-left="0.122cm" fo:margin-right="0.191cm" fo:margin-top="0cm" fo:margin-bottom="0cm" table:align="margins"/>
    </style:style>
    <style:style style:name="Tabla3.A" style:family="table-column">
      <style:table-column-properties style:column-width="15.609cm" style:rel-column-width="65535*"/>
    </style:style>
    <style:style style:name="Tabla3.1" style:family="table-row">
      <style:table-row-properties style:keep-together="true" fo:keep-together="auto"/>
    </style:style>
    <style:style style:name="Tabla3.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4" style:family="table">
      <style:table-properties style:width="15.609cm" fo:margin-left="0.122cm" fo:margin-right="0.191cm" fo:margin-top="0cm" fo:margin-bottom="0cm" table:align="margins"/>
    </style:style>
    <style:style style:name="Tabla4.A" style:family="table-column">
      <style:table-column-properties style:column-width="15.609cm" style:rel-column-width="65535*"/>
    </style:style>
    <style:style style:name="Tabla4.1" style:family="table-row">
      <style:table-row-properties style:keep-together="true" fo:keep-together="auto"/>
    </style:style>
    <style:style style:name="Tabla4.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5" style:family="table">
      <style:table-properties style:width="15.609cm" fo:margin-left="0.122cm" fo:margin-right="0.191cm" fo:margin-top="0cm" fo:margin-bottom="0cm" table:align="margins"/>
    </style:style>
    <style:style style:name="Tabla5.A" style:family="table-column">
      <style:table-column-properties style:column-width="15.609cm" style:rel-column-width="65535*"/>
    </style:style>
    <style:style style:name="Tabla5.1" style:family="table-row">
      <style:table-row-properties style:keep-together="true" fo:keep-together="auto"/>
    </style:style>
    <style:style style:name="Tabla5.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6" style:family="table">
      <style:table-properties style:width="15.64cm" fo:margin-left="0.09cm" fo:margin-right="0.191cm" fo:margin-top="0cm" fo:margin-bottom="0cm" table:align="margins"/>
    </style:style>
    <style:style style:name="Tabla6.A" style:family="table-column">
      <style:table-column-properties style:column-width="15.64cm" style:rel-column-width="65535*"/>
    </style:style>
    <style:style style:name="Tabla6.1" style:family="table-row">
      <style:table-row-properties style:keep-together="true" fo:keep-together="auto"/>
    </style:style>
    <style:style style:name="Tabla6.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7" style:family="table">
      <style:table-properties style:width="15.656cm" fo:margin-left="0.074cm" fo:margin-right="0.191cm" fo:margin-top="0cm" fo:margin-bottom="0cm" table:align="margins"/>
    </style:style>
    <style:style style:name="Tabla7.A" style:family="table-column">
      <style:table-column-properties style:column-width="15.656cm" style:rel-column-width="65535*"/>
    </style:style>
    <style:style style:name="Tabla7.1" style:family="table-row">
      <style:table-row-properties style:keep-together="true" fo:keep-together="auto"/>
    </style:style>
    <style:style style:name="Tabla7.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8" style:family="table">
      <style:table-properties style:width="15.67cm" fo:margin-left="0.06cm" fo:margin-right="0.191cm" fo:margin-top="0cm" fo:margin-bottom="0cm" table:align="margins"/>
    </style:style>
    <style:style style:name="Tabla8.A" style:family="table-column">
      <style:table-column-properties style:column-width="15.67cm" style:rel-column-width="65535*"/>
    </style:style>
    <style:style style:name="Tabla8.1" style:family="table-row">
      <style:table-row-properties style:keep-together="true" fo:keep-together="auto"/>
    </style:style>
    <style:style style:name="Tabla8.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9" style:family="table">
      <style:table-properties style:width="15.625cm" fo:margin-left="0.106cm" fo:margin-right="0.191cm" fo:margin-top="0cm" fo:margin-bottom="0cm" table:align="margins"/>
    </style:style>
    <style:style style:name="Tabla9.A" style:family="table-column">
      <style:table-column-properties style:column-width="4.295cm" style:rel-column-width="18015*"/>
    </style:style>
    <style:style style:name="Tabla9.B" style:family="table-column">
      <style:table-column-properties style:column-width="6.35cm" style:rel-column-width="26634*"/>
    </style:style>
    <style:style style:name="Tabla9.C" style:family="table-column">
      <style:table-column-properties style:column-width="4.979cm" style:rel-column-width="20886*"/>
    </style:style>
    <style:style style:name="Tabla9.1" style:family="table-row">
      <style:table-row-properties style:keep-together="true" fo:keep-together="auto"/>
    </style:style>
    <style:style style:name="Tabla9.A1" style:family="table-cell">
      <style:table-cell-properties style:vertical-align="middle" fo:background-color="#7a3b2e" fo:padding-left="0.191cm" fo:padding-right="0.191cm" fo:padding-top="0cm" fo:padding-bottom="0cm" fo:border="0.002cm solid #e0d5ce">
        <style:background-image/>
      </style:table-cell-properties>
    </style:style>
    <style:style style:name="Tabla9.A2" style:family="table-cell">
      <style:table-cell-properties style:vertical-align="middle" fo:padding-left="0.191cm" fo:padding-right="0.191cm" fo:padding-top="0cm" fo:padding-bottom="0cm" fo:border="0.002cm solid #e0d5ce"/>
    </style:style>
    <style:style style:name="Tabla10" style:family="table">
      <style:table-properties style:width="15.609cm" fo:margin-left="0.122cm" fo:margin-right="0.191cm" fo:margin-top="0cm" fo:margin-bottom="0cm" table:align="margins"/>
    </style:style>
    <style:style style:name="Tabla10.A" style:family="table-column">
      <style:table-column-properties style:column-width="15.609cm" style:rel-column-width="65535*"/>
    </style:style>
    <style:style style:name="Tabla10.1" style:family="table-row">
      <style:table-row-properties style:keep-together="true" fo:keep-together="auto"/>
    </style:style>
    <style:style style:name="Tabla10.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11" style:family="table">
      <style:table-properties style:width="15.625cm" fo:margin-left="0.106cm" fo:margin-right="0.191cm" fo:margin-top="0cm" fo:margin-bottom="0cm" table:align="margins"/>
    </style:style>
    <style:style style:name="Tabla11.A" style:family="table-column">
      <style:table-column-properties style:column-width="5.043cm" style:rel-column-width="21152*"/>
    </style:style>
    <style:style style:name="Tabla11.B" style:family="table-column">
      <style:table-column-properties style:column-width="5.292cm" style:rel-column-width="22195*"/>
    </style:style>
    <style:style style:name="Tabla11.C" style:family="table-column">
      <style:table-column-properties style:column-width="5.29cm" style:rel-column-width="22188*"/>
    </style:style>
    <style:style style:name="Tabla11.1" style:family="table-row">
      <style:table-row-properties style:keep-together="true" fo:keep-together="auto"/>
    </style:style>
    <style:style style:name="Tabla11.A1" style:family="table-cell">
      <style:table-cell-properties style:vertical-align="middle" fo:background-color="#7a3b2e" fo:padding-left="0.191cm" fo:padding-right="0.191cm" fo:padding-top="0cm" fo:padding-bottom="0cm" fo:border="0.002cm solid #e0d5ce">
        <style:background-image/>
      </style:table-cell-properties>
    </style:style>
    <style:style style:name="Tabla11.A2" style:family="table-cell">
      <style:table-cell-properties style:vertical-align="middle" fo:padding-left="0.191cm" fo:padding-right="0.191cm" fo:padding-top="0cm" fo:padding-bottom="0cm" fo:border="0.002cm solid #e0d5ce"/>
    </style:style>
    <style:style style:name="Tabla12" style:family="table">
      <style:table-properties style:width="15.702cm" fo:margin-left="0.028cm" fo:margin-right="0.191cm" fo:margin-top="0cm" fo:margin-bottom="0cm" table:align="margins"/>
    </style:style>
    <style:style style:name="Tabla12.A" style:family="table-column">
      <style:table-column-properties style:column-width="5.121cm" style:rel-column-width="21371*"/>
    </style:style>
    <style:style style:name="Tabla12.B" style:family="table-column">
      <style:table-column-properties style:column-width="5.292cm" style:rel-column-width="22085*"/>
    </style:style>
    <style:style style:name="Tabla12.C" style:family="table-column">
      <style:table-column-properties style:column-width="5.29cm" style:rel-column-width="22079*"/>
    </style:style>
    <style:style style:name="Tabla12.1" style:family="table-row">
      <style:table-row-properties style:keep-together="true" fo:keep-together="auto"/>
    </style:style>
    <style:style style:name="Tabla12.A1" style:family="table-cell">
      <style:table-cell-properties style:vertical-align="middle" fo:background-color="#7a3b2e" fo:padding-left="0.191cm" fo:padding-right="0.191cm" fo:padding-top="0cm" fo:padding-bottom="0cm" fo:border="0.002cm solid #e0d5ce">
        <style:background-image/>
      </style:table-cell-properties>
    </style:style>
    <style:style style:name="Tabla12.A2" style:family="table-cell">
      <style:table-cell-properties style:vertical-align="middle" fo:padding-left="0.191cm" fo:padding-right="0.191cm" fo:padding-top="0cm" fo:padding-bottom="0cm" fo:border="0.002cm solid #e0d5ce"/>
    </style:style>
    <style:style style:name="Tabla13" style:family="table">
      <style:table-properties style:width="15.593cm" fo:margin-left="0.138cm" fo:margin-right="0.191cm" fo:margin-top="0cm" fo:margin-bottom="0cm" table:align="margins"/>
    </style:style>
    <style:style style:name="Tabla13.A" style:family="table-column">
      <style:table-column-properties style:column-width="4.078cm" style:rel-column-width="17139*"/>
    </style:style>
    <style:style style:name="Tabla13.B" style:family="table-column">
      <style:table-column-properties style:column-width="3.004cm" style:rel-column-width="12625*"/>
    </style:style>
    <style:style style:name="Tabla13.C" style:family="table-column">
      <style:table-column-properties style:column-width="8.511cm" style:rel-column-width="35771*"/>
    </style:style>
    <style:style style:name="Tabla13.1" style:family="table-row">
      <style:table-row-properties style:keep-together="true" fo:keep-together="auto"/>
    </style:style>
    <style:style style:name="Tabla13.A1" style:family="table-cell">
      <style:table-cell-properties style:vertical-align="middle" fo:background-color="#7a3b2e" fo:padding-left="0.191cm" fo:padding-right="0.191cm" fo:padding-top="0cm" fo:padding-bottom="0cm" fo:border="0.002cm solid #e0d5ce">
        <style:background-image/>
      </style:table-cell-properties>
    </style:style>
    <style:style style:name="Tabla13.A2" style:family="table-cell">
      <style:table-cell-properties style:vertical-align="middle" fo:padding-left="0.191cm" fo:padding-right="0.191cm" fo:padding-top="0cm" fo:padding-bottom="0cm" fo:border="0.002cm solid #e0d5ce"/>
    </style:style>
    <style:style style:name="Tabla14" style:family="table">
      <style:table-properties style:width="15.64cm" fo:margin-left="0.09cm" fo:margin-right="0.191cm" fo:margin-top="0cm" fo:margin-bottom="0cm" table:align="margins"/>
    </style:style>
    <style:style style:name="Tabla14.A" style:family="table-column">
      <style:table-column-properties style:column-width="15.64cm" style:rel-column-width="65535*"/>
    </style:style>
    <style:style style:name="Tabla14.1" style:family="table-row">
      <style:table-row-properties style:keep-together="true" fo:keep-together="auto"/>
    </style:style>
    <style:style style:name="Tabla14.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15" style:family="table">
      <style:table-properties style:width="15.656cm" fo:margin-left="0.074cm" fo:margin-right="0.191cm" fo:margin-top="0cm" fo:margin-bottom="0cm" table:align="margins"/>
    </style:style>
    <style:style style:name="Tabla15.A" style:family="table-column">
      <style:table-column-properties style:column-width="15.656cm" style:rel-column-width="65535*"/>
    </style:style>
    <style:style style:name="Tabla15.1" style:family="table-row">
      <style:table-row-properties style:keep-together="true" fo:keep-together="auto"/>
    </style:style>
    <style:style style:name="Tabla15.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16" style:family="table">
      <style:table-properties style:width="15.656cm" fo:margin-left="0.074cm" fo:margin-right="0.191cm" fo:margin-top="0cm" fo:margin-bottom="0cm" table:align="margins"/>
    </style:style>
    <style:style style:name="Tabla16.A" style:family="table-column">
      <style:table-column-properties style:column-width="0.965cm" style:rel-column-width="4038*"/>
    </style:style>
    <style:style style:name="Tabla16.B" style:family="table-column">
      <style:table-column-properties style:column-width="14.691cm" style:rel-column-width="61497*"/>
    </style:style>
    <style:style style:name="Tabla16.1" style:family="table-row">
      <style:table-row-properties style:keep-together="true" fo:keep-together="auto"/>
    </style:style>
    <style:style style:name="Tabla16.A1" style:family="table-cell">
      <style:table-cell-properties style:vertical-align="middle" fo:background-color="#7a3b2e" fo:padding-left="0.191cm" fo:padding-right="0.191cm" fo:padding-top="0cm" fo:padding-bottom="0cm" fo:border="0.002cm solid #e0d5ce">
        <style:background-image/>
      </style:table-cell-properties>
    </style:style>
    <style:style style:name="Tabla16.A2" style:family="table-cell">
      <style:table-cell-properties style:vertical-align="middle" fo:padding-left="0.191cm" fo:padding-right="0.191cm" fo:padding-top="0cm" fo:padding-bottom="0cm" fo:border="0.002cm solid #e0d5ce"/>
    </style:style>
    <style:style style:name="Tabla17" style:family="table">
      <style:table-properties style:width="15.593cm" fo:margin-left="0.138cm" fo:margin-right="0.191cm" fo:margin-top="0cm" fo:margin-bottom="0cm" table:align="margins"/>
    </style:style>
    <style:style style:name="Tabla17.A" style:family="table-column">
      <style:table-column-properties style:column-width="15.593cm" style:rel-column-width="65535*"/>
    </style:style>
    <style:style style:name="Tabla17.1" style:family="table-row">
      <style:table-row-properties style:keep-together="true" fo:keep-together="auto"/>
    </style:style>
    <style:style style:name="Tabla17.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18" style:family="table">
      <style:table-properties style:width="15.625cm" fo:margin-left="0.106cm" fo:margin-right="0.191cm" fo:margin-top="0cm" fo:margin-bottom="0cm" table:align="margins"/>
    </style:style>
    <style:style style:name="Tabla18.A" style:family="table-column">
      <style:table-column-properties style:column-width="15.625cm" style:rel-column-width="65535*"/>
    </style:style>
    <style:style style:name="Tabla18.1" style:family="table-row">
      <style:table-row-properties style:keep-together="true" fo:keep-together="auto"/>
    </style:style>
    <style:style style:name="Tabla18.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19" style:family="table">
      <style:table-properties style:width="15.64cm" fo:margin-left="0.09cm" fo:margin-right="0.191cm" fo:margin-top="0cm" fo:margin-bottom="0cm" table:align="margins"/>
    </style:style>
    <style:style style:name="Tabla19.A" style:family="table-column">
      <style:table-column-properties style:column-width="15.64cm" style:rel-column-width="65535*"/>
    </style:style>
    <style:style style:name="Tabla19.1" style:family="table-row">
      <style:table-row-properties style:keep-together="true" fo:keep-together="auto"/>
    </style:style>
    <style:style style:name="Tabla19.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P1" style:family="paragraph" style:parent-style-name="Standard">
      <style:paragraph-properties fo:margin-top="0cm" fo:margin-bottom="0.088cm" fo:text-align="center" style:justify-single-word="false"/>
    </style:style>
    <style:style style:name="P2" style:family="paragraph" style:parent-style-name="Standard">
      <style:paragraph-properties fo:margin-top="0cm" fo:margin-bottom="0.088cm"/>
      <style:text-properties fo:text-transform="uppercase" fo:color="#7a3b2e" style:font-name="Calibri" fo:font-size="9.5pt" fo:font-weight="bold" style:font-name-asian="Calibri2" style:font-size-asian="9.5pt" style:font-weight-asian="bold" style:font-name-complex="Calibri2" style:font-size-complex="9.5pt" style:font-weight-complex="bold"/>
    </style:style>
    <style:style style:name="P3" style:family="paragraph" style:parent-style-name="Standard">
      <style:paragraph-properties fo:margin-top="0cm" fo:margin-bottom="0.106cm"/>
    </style:style>
    <style:style style:name="P4" style:family="paragraph" style:parent-style-name="Standard">
      <style:paragraph-properties fo:margin-top="0cm" fo:margin-bottom="0.106cm" fo:text-align="center" style:justify-single-word="false"/>
      <style:text-properties fo:color="#6b5e57" style:font-name="Calibri" fo:font-size="9.5pt" fo:font-style="italic" style:font-name-asian="Calibri2" style:font-size-asian="9.5pt" style:font-style-asian="italic" style:font-name-complex="Calibri2" style:font-size-complex="9.5pt" style:font-style-complex="italic"/>
    </style:style>
    <style:style style:name="P5" style:family="paragraph" style:parent-style-name="Standard">
      <style:paragraph-properties fo:margin-top="0cm" fo:margin-bottom="0.106cm" fo:line-height="0.466cm" fo:text-align="justify" style:justify-single-word="false"/>
      <style:text-properties fo:color="#2b2320" style:font-name="Calibri" fo:font-size="10pt" style:font-name-asian="Calibri2" style:font-size-asian="10pt" style:font-name-complex="Calibri2" style:font-size-complex="10pt"/>
    </style:style>
    <style:style style:name="P6" style:family="paragraph" style:parent-style-name="Standard">
      <style:paragraph-properties fo:margin-top="0.106cm" fo:margin-bottom="0.106cm" fo:text-align="center" style:justify-single-word="false" fo:padding-left="0cm" fo:padding-right="0cm" fo:padding-top="0cm" fo:padding-bottom="0.071cm" fo:border-left="none" fo:border-right="none" fo:border-top="none" fo:border-bottom="0.053cm solid #7a3b2e"/>
    </style:style>
    <style:style style:name="P7" style:family="paragraph" style:parent-style-name="Standard">
      <style:paragraph-properties fo:margin-top="0cm" fo:margin-bottom="0.247cm" fo:line-height="0.487cm" fo:text-align="justify" style:justify-single-word="false"/>
    </style:style>
    <style:style style:name="P8" style:family="paragraph" style:parent-style-name="Standard">
      <style:paragraph-properties fo:margin-top="0cm" fo:margin-bottom="0.247cm" fo:line-height="0.487cm" fo:text-align="justify" style:justify-single-word="false"/>
      <style:text-properties fo:color="#2b2320" style:font-name="Calibri" fo:font-size="10.5pt" style:font-name-asian="Calibri2" style:font-size-asian="10.5pt" style:font-name-complex="Calibri2" style:font-size-complex="10.5pt"/>
    </style:style>
    <style:style style:name="P9" style:family="paragraph" style:parent-style-name="Standard">
      <style:paragraph-properties fo:margin-top="0cm" fo:margin-bottom="0.141cm"/>
    </style:style>
    <style:style style:name="P10" style:family="paragraph" style:parent-style-name="Standard">
      <style:paragraph-properties fo:margin-top="0cm" fo:margin-bottom="0.212cm"/>
    </style:style>
    <style:style style:name="P11" style:family="paragraph" style:parent-style-name="Standard">
      <style:paragraph-properties fo:margin-top="0cm" fo:margin-bottom="0.176cm"/>
    </style:style>
    <style:style style:name="P12" style:family="paragraph" style:parent-style-name="Standard">
      <style:paragraph-properties fo:margin-top="0cm" fo:margin-bottom="0.459cm"/>
    </style:style>
    <style:style style:name="P13" style:family="paragraph" style:parent-style-name="Standard">
      <style:paragraph-properties fo:margin-top="0.388cm" fo:margin-bottom="0.071cm" fo:text-align="center" style:justify-single-word="false"/>
      <style:text-properties fo:color="#2b2320" style:font-name="Calibri" fo:font-size="15pt" fo:font-weight="bold" style:font-name-asian="Calibri2" style:font-size-asian="15pt" style:font-weight-asian="bold" style:font-name-complex="Calibri2" style:font-size-complex="15pt" style:font-weight-complex="bold"/>
    </style:style>
    <style:style style:name="P14" style:family="paragraph" style:parent-style-name="Standard">
      <style:paragraph-properties fo:margin-top="0cm" fo:margin-bottom="0.071cm" fo:text-align="center" style:justify-single-word="false"/>
      <style:text-properties fo:color="#6b5e57" style:font-name="Calibri" fo:font-size="11pt" style:font-name-asian="Calibri2" style:font-size-asian="11pt" style:font-name-complex="Calibri2" style:font-size-complex="11pt"/>
    </style:style>
    <style:style style:name="P15" style:family="paragraph" style:parent-style-name="Standard">
      <style:paragraph-properties fo:text-align="center" style:justify-single-word="false"/>
      <style:text-properties fo:color="#ffffff" style:font-name="Calibri" fo:font-size="10pt" fo:font-weight="bold" style:font-name-asian="Calibri2" style:font-size-asian="10pt" style:font-weight-asian="bold" style:font-name-complex="Calibri2" style:font-size-complex="10pt" style:font-weight-complex="bold"/>
    </style:style>
    <style:style style:name="P16" style:family="paragraph" style:parent-style-name="Standard">
      <style:paragraph-properties fo:text-align="start" style:justify-single-word="false"/>
      <style:text-properties fo:color="#ffffff" style:font-name="Calibri" fo:font-size="10pt" fo:font-weight="bold" style:font-name-asian="Calibri2" style:font-size-asian="10pt" style:font-weight-asian="bold" style:font-name-complex="Calibri2" style:font-size-complex="10pt" style:font-weight-complex="bold"/>
    </style:style>
    <style:style style:name="P17" style:family="paragraph" style:parent-style-name="Standard">
      <style:paragraph-properties fo:text-align="center" style:justify-single-word="false"/>
      <style:text-properties fo:color="#2b2320" style:font-name="Calibri" fo:font-size="10pt" fo:font-weight="normal" style:font-name-asian="Calibri2" style:font-size-asian="10pt" style:font-weight-asian="normal" style:font-name-complex="Calibri2" style:font-size-complex="10pt" style:font-weight-complex="normal"/>
    </style:style>
    <style:style style:name="P18" style:family="paragraph" style:parent-style-name="Standard">
      <style:paragraph-properties fo:text-align="start" style:justify-single-word="false"/>
      <style:text-properties fo:color="#2b2320" style:font-name="Calibri" fo:font-size="10pt" fo:font-weight="normal" style:font-name-asian="Calibri2" style:font-size-asian="10pt" style:font-weight-asian="normal" style:font-name-complex="Calibri2" style:font-size-complex="10pt" style:font-weight-complex="normal"/>
    </style:style>
    <style:style style:name="P19" style:family="paragraph" style:parent-style-name="Standard">
      <style:paragraph-properties fo:text-align="start" style:justify-single-word="false"/>
      <style:text-properties fo:color="#2b2320" style:font-name="Calibri" fo:font-size="10pt" fo:font-weight="bold" style:font-name-asian="Calibri2" style:font-size-asian="10pt" style:font-weight-asian="bold" style:font-name-complex="Calibri2" style:font-size-complex="10pt" style:font-weight-complex="bold"/>
    </style:style>
    <style:style style:name="P20" style:family="paragraph" style:parent-style-name="Standard">
      <style:paragraph-properties fo:margin-top="0cm" fo:margin-bottom="0cm" fo:line-height="0.466cm" fo:text-align="justify" style:justify-single-word="false"/>
      <style:text-properties fo:color="#2b2320" style:font-name="Calibri" fo:font-size="10pt" style:font-name-asian="Calibri2" style:font-size-asian="10pt" style:font-name-complex="Calibri2" style:font-size-complex="10pt"/>
    </style:style>
    <style:style style:name="P21" style:family="paragraph" style:parent-style-name="Standard">
      <style:paragraph-properties fo:margin-top="0.106cm" fo:margin-bottom="0.282cm" fo:text-align="center" style:justify-single-word="false"/>
      <style:text-properties fo:color="#7a3b2e" style:font-name="Calibri" fo:font-size="11.5pt" fo:font-weight="bold" style:font-name-asian="Calibri2" style:font-size-asian="11.5pt" style:font-weight-asian="bold" style:font-name-complex="Calibri2" style:font-size-complex="11.5pt" style:font-weight-complex="bold"/>
    </style:style>
    <style:style style:name="P22" style:family="paragraph" style:parent-style-name="Standard">
      <style:paragraph-properties fo:margin-top="0.282cm" fo:margin-bottom="0.141cm"/>
      <style:text-properties fo:color="#2b2320" style:font-name="Calibri" fo:font-size="11pt" fo:font-weight="bold" style:font-name-asian="Calibri2" style:font-size-asian="11pt" style:font-weight-asian="bold" style:font-name-complex="Calibri2" style:font-size-complex="11pt" style:font-weight-complex="bold"/>
    </style:style>
    <style:style style:name="P23" style:family="paragraph" style:parent-style-name="Heading_20_2">
      <style:paragraph-properties fo:margin-top="0.423cm" fo:margin-bottom="0.176cm"/>
      <style:text-properties fo:color="#a85c49" style:font-name="Calibri" fo:font-size="12.5pt" fo:font-weight="bold" style:font-name-asian="Calibri2" style:font-size-asian="12.5pt" style:font-weight-asian="bold" style:font-name-complex="Calibri2" style:font-size-complex="12.5pt" style:font-weight-complex="bold"/>
    </style:style>
    <style:style style:name="P24" style:family="paragraph" style:parent-style-name="Heading_20_1">
      <style:paragraph-properties fo:margin-top="0.6cm" fo:margin-bottom="0.282cm" fo:break-before="page" fo:padding-left="0cm" fo:padding-right="0cm" fo:padding-top="0cm" fo:padding-bottom="0.141cm" fo:border-left="none" fo:border-right="none" fo:border-top="none" fo:border-bottom="0.079cm solid #7a3b2e"/>
      <style:text-properties fo:color="#7a3b2e" style:font-name="Calibri" fo:font-size="16pt" fo:font-weight="bold" style:font-name-asian="Calibri2" style:font-size-asian="16pt" style:font-weight-asian="bold" style:font-name-complex="Calibri2" style:font-size-complex="16pt" style:font-weight-complex="bold"/>
    </style:style>
    <style:style style:name="P25" style:family="paragraph" style:parent-style-name="Heading_20_1">
      <style:paragraph-properties fo:margin-top="0.6cm" fo:margin-bottom="0.282cm" fo:padding-left="0cm" fo:padding-right="0cm" fo:padding-top="0cm" fo:padding-bottom="0.141cm" fo:border-left="none" fo:border-right="none" fo:border-top="none" fo:border-bottom="0.079cm solid #7a3b2e"/>
      <style:text-properties fo:color="#7a3b2e" style:font-name="Calibri" fo:font-size="16pt" fo:font-weight="bold" style:font-name-asian="Calibri2" style:font-size-asian="16pt" style:font-weight-asian="bold" style:font-name-complex="Calibri2" style:font-size-complex="16pt" style:font-weight-complex="bold"/>
    </style:style>
    <style:style style:name="P26" style:family="paragraph" style:parent-style-name="Standard" style:master-page-name="Standard">
      <style:paragraph-properties fo:margin-top="0cm" fo:margin-bottom="1.058cm" style:page-number="auto"/>
    </style:style>
    <style:style style:name="P27" style:family="paragraph" style:parent-style-name="List_20_Paragraph" style:list-style-name="WWNum2">
      <style:paragraph-properties fo:margin-top="0cm" fo:margin-bottom="0.159cm" fo:line-height="0.476cm" fo:text-align="justify" style:justify-single-word="false"/>
      <style:text-properties fo:color="#2b2320" style:font-name="Calibri" fo:font-size="10.5pt" style:font-name-asian="Calibri2" style:font-size-asian="10.5pt" style:font-name-complex="Calibri2" style:font-size-complex="10.5pt"/>
    </style:style>
    <style:style style:name="P28" style:family="paragraph" style:parent-style-name="List_20_Paragraph" style:list-style-name="WWNum2">
      <style:paragraph-properties fo:margin-top="0cm" fo:margin-bottom="0.159cm" fo:line-height="0.476cm" fo:text-align="justify" style:justify-single-word="false"/>
    </style:style>
    <style:style style:name="T1" style:family="text">
      <style:text-properties fo:color="#2b2320" style:font-name="Calibri" fo:font-size="10.5pt" style:font-name-asian="Calibri2" style:font-size-asian="10.5pt" style:font-name-complex="Calibri2" style:font-size-complex="10.5pt"/>
    </style:style>
    <style:style style:name="T2" style:family="text">
      <style:text-properties fo:color="#2b2320" style:font-name="Calibri" fo:font-size="10.5pt" fo:font-weight="bold" style:font-name-asian="Calibri2" style:font-size-asian="10.5pt" style:font-weight-asian="bold" style:font-name-complex="Calibri2" style:font-size-complex="10.5pt" style:font-weight-complex="bold"/>
    </style:style>
    <style:style style:name="T3" style:family="text">
      <style:text-properties fo:color="#2b2320" style:font-name="Calibri" fo:font-size="10.5pt" fo:font-weight="normal" style:font-name-asian="Calibri2" style:font-size-asian="10.5pt" style:font-weight-asian="normal" style:font-name-complex="Calibri2" style:font-size-complex="10.5pt"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draw:frame draw:style-name="fr1" draw:name="1" text:anchor-type="as-char" svg:width="3.784cm" svg:height="3.969cm" draw:z-index="0"><draw:image xlink:href="Pictures/10000201000002300000024C962F2501.png" xlink:type="simple" xlink:show="embed" xlink:actuate="onLoad"/></draw:frame></text:p>
      <text:p text:style-name="P4">Donde la localidad es costumbre</text:p>
      <text:p text:style-name="P6"/>
      <text:p text:style-name="P13">MEMORIA TÉCNICA · SISTEMA DE RECOMENDACIÓN</text:p>
      <text:p text:style-name="P14">Data Science — Asistente Cultural y Gastronómico del País Vasco</text:p>
      <text:p text:style-name="P14">Desafío de Tripulaciones · Junio 2026</text:p>
      <text:p text:style-name="Standard"/>
      <text:h text:style-name="P24" text:outline-level="1">Contenido</text:h>
      <table:table table:name="Tabla1" table:style-name="Tabla1">
        <table:table-column table:style-name="Tabla1.A"/>
        <table:table-column table:style-name="Tabla1.B"/>
        <table:table-header-rows>
          <table:table-row table:style-name="Tabla1.1">
            <table:table-cell table:style-name="Tabla1.A1" office:value-type="string">
              <text:p text:style-name="P15">#</text:p>
            </table:table-cell>
            <table:table-cell table:style-name="Tabla1.A1" office:value-type="string">
              <text:p text:style-name="P16">Sección</text:p>
            </table:table-cell>
          </table:table-row>
        </table:table-header-rows>
        <table:table-row table:style-name="Tabla1.1">
          <table:table-cell table:style-name="Tabla1.A2" office:value-type="string">
            <text:p text:style-name="P17">1</text:p>
          </table:table-cell>
          <table:table-cell table:style-name="Tabla1.A2" office:value-type="string">
            <text:p text:style-name="P18">Introducción y Contexto</text:p>
          </table:table-cell>
        </table:table-row>
        <table:table-row table:style-name="Tabla1.1">
          <table:table-cell table:style-name="Tabla1.A2" office:value-type="string">
            <text:p text:style-name="P17">2</text:p>
          </table:table-cell>
          <table:table-cell table:style-name="Tabla1.A2" office:value-type="string">
            <text:p text:style-name="P18">Fuentes de Datos</text:p>
          </table:table-cell>
        </table:table-row>
        <table:table-row table:style-name="Tabla1.1">
          <table:table-cell table:style-name="Tabla1.A2" office:value-type="string">
            <text:p text:style-name="P17">3</text:p>
          </table:table-cell>
          <table:table-cell table:style-name="Tabla1.A2" office:value-type="string">
            <text:p text:style-name="P18">Procesamiento y Limpieza</text:p>
          </table:table-cell>
        </table:table-row>
        <table:table-row table:style-name="Tabla1.1">
          <table:table-cell table:style-name="Tabla1.A2" office:value-type="string">
            <text:p text:style-name="P17">4</text:p>
          </table:table-cell>
          <table:table-cell table:style-name="Tabla1.A2" office:value-type="string">
            <text:p text:style-name="P18">Análisis Exploratorio de Datos</text:p>
          </table:table-cell>
        </table:table-row>
        <table:table-row table:style-name="Tabla1.1">
          <table:table-cell table:style-name="Tabla1.A2" office:value-type="string">
            <text:p text:style-name="P17">5</text:p>
          </table:table-cell>
          <table:table-cell table:style-name="Tabla1.A2" office:value-type="string">
            <text:p text:style-name="P18">Arquitectura de Recomendación</text:p>
          </table:table-cell>
        </table:table-row>
        <table:table-row table:style-name="Tabla1.1">
          <table:table-cell table:style-name="Tabla1.A2" office:value-type="string">
            <text:p text:style-name="P17">6</text:p>
          </table:table-cell>
          <table:table-cell table:style-name="Tabla1.A2" office:value-type="string">
            <text:p text:style-name="P18">Modelos de Recomendación</text:p>
          </table:table-cell>
        </table:table-row>
        <table:table-row table:style-name="Tabla1.1">
          <table:table-cell table:style-name="Tabla1.A2" office:value-type="string">
            <text:p text:style-name="P17">7</text:p>
          </table:table-cell>
          <table:table-cell table:style-name="Tabla1.A2" office:value-type="string">
            <text:p text:style-name="P18">Evaluación y Validación</text:p>
          </table:table-cell>
        </table:table-row>
        <table:table-row table:style-name="Tabla1.1">
          <table:table-cell table:style-name="Tabla1.A2" office:value-type="string">
            <text:p text:style-name="P17">8</text:p>
          </table:table-cell>
          <table:table-cell table:style-name="Tabla1.A2" office:value-type="string">
            <text:p text:style-name="P18">Integración (Chatbot, API y Backend)</text:p>
          </table:table-cell>
        </table:table-row>
        <table:table-row table:style-name="Tabla1.1">
          <table:table-cell table:style-name="Tabla1.A2" office:value-type="string">
            <text:p text:style-name="P17">9</text:p>
          </table:table-cell>
          <table:table-cell table:style-name="Tabla1.A2" office:value-type="string">
            <text:p text:style-name="P18">Roadmap Futuro</text:p>
          </table:table-cell>
        </table:table-row>
      </table:table>
      <text:p text:style-name="Standard"/>
      <text:h text:style-name="P24" text:outline-level="1">1. Introducción y Contexto</text:h>
      <text:p text:style-name="P8">SustraiApp es una plataforma de recomendación cultural y gastronómica diseñada específicamente para el público del País Vasco. El objetivo es convertir peticiones en lenguaje natural en recomendaciones de alta calidad que combinen experiencias gastronómicas, patrimonio cultural y eventos de interés.</text:p>
      <text:p text:style-name="P8">El sistema de recomendación está orientado a un público objetivo de 45–65 años que valora experiencias premium pero no elitistas. Estos usuarios buscan calidad, autenticidad y relevancia local, con una incidencia alta de preferencia por búsquedas en lenguaje natural (chatbot) frente a filtros tradicionales.</text:p>
      <text:p text:style-name="P8">Esta memoria documenta el pipeline completo de Data Science: desde las fuentes de datos hasta la arquitectura final de seis modelos de recomendación (dos por categoría de contenido), con mecanismos específicos para usuarios en fase cold-start y usuarios con histórico de interacciones.</text:p>
      <text:h text:style-name="P25" text:outline-level="1">2. Fuentes de Datos</text:h>
      <text:p text:style-name="P8">El catálogo de recomendación se construye a partir de múltiples fuentes oficiales y de terceros:</text:p>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P16">Fuente</text:p>
            </table:table-cell>
            <table:table-cell table:style-name="Tabla2.A1" office:value-type="string">
              <text:p text:style-name="P16">Contenido</text:p>
            </table:table-cell>
            <table:table-cell table:style-name="Tabla2.A1" office:value-type="string">
              <text:p text:style-name="P15">Registros</text:p>
            </table:table-cell>
          </table:table-row>
        </table:table-header-rows>
        <table:table-row table:style-name="Tabla2.1">
          <table:table-cell table:style-name="Tabla2.A2" office:value-type="string">
            <text:p text:style-name="P19">Open Data Euskadi</text:p>
          </table:table-cell>
          <table:table-cell table:style-name="Tabla2.A2" office:value-type="string">
            <text:p text:style-name="P18">Gastronomía, Patrimonio</text:p>
          </table:table-cell>
          <table:table-cell table:style-name="Tabla2.A2" office:value-type="string">
            <text:p text:style-name="P17">~1300</text:p>
          </table:table-cell>
        </table:table-row>
        <table:table-row table:style-name="Tabla2.1">
          <table:table-cell table:style-name="Tabla2.A2" office:value-type="string">
            <text:p text:style-name="P19">Kulturklik</text:p>
          </table:table-cell>
          <table:table-cell table:style-name="Tabla2.A2" office:value-type="string">
            <text:p text:style-name="P18">Eventos culturales, conciertos</text:p>
          </table:table-cell>
          <table:table-cell table:style-name="Tabla2.A2" office:value-type="string">
            <text:p text:style-name="P17">~2800</text:p>
          </table:table-cell>
        </table:table-row>
        <table:table-row table:style-name="Tabla2.1">
          <table:table-cell table:style-name="Tabla2.A2" office:value-type="string">
            <text:p text:style-name="P19">Google Places</text:p>
          </table:table-cell>
          <table:table-cell table:style-name="Tabla2.A2" office:value-type="string">
            <text:p text:style-name="P18">Valoraciones, reseñas, precios</text:p>
          </table:table-cell>
          <table:table-cell table:style-name="Tabla2.A2" office:value-type="string">
            <text:p text:style-name="P17">~900</text:p>
          </table:table-cell>
        </table:table-row>
        <table:table-row table:style-name="Tabla2.1">
          <table:table-cell table:style-name="Tabla2.A2" office:value-type="string">
            <text:p text:style-name="P19">Listados Oficiales</text:p>
          </table:table-cell>
          <table:table-cell table:style-name="Tabla2.A2" office:value-type="string">
            <text:p text:style-name="P18">Michelin, Repsol, Denominaciones</text:p>
          </table:table-cell>
          <table:table-cell table:style-name="Tabla2.A2" office:value-type="string">
            <text:p text:style-name="P17">~150</text:p>
          </table:table-cell>
        </table:table-row>
      </table:table>
      <text:h text:style-name="P25" text:outline-level="1">3. Procesamiento y Limpieza de Datos</text:h>
      <text:h text:style-name="P23" text:outline-level="2">3.1 Criterios de Filtrado</text:h>
      <text:p text:style-name="P8">Los datos de catálogo se sometieron a criterios de calidad estrictos:</text:p>
      <table:table table:name="Tabla3" table:style-name="Tabla3">
        <table:table-column table:style-name="Tabla3.A"/>
        <table:table-row table:style-name="Tabla3.1">
          <table:table-cell table:style-name="Tabla3.A1" office:value-type="string">
            <text:p text:style-name="P2">🍴 Gastronomía</text:p>
            <text:p text:style-name="P20">Valoración &gt; 4.0 ⭐ · Rango de precios moderado–muy caro · Negocios establecidos.</text:p>
          </table:table-cell>
        </table:table-row>
      </table:table>
      <text:p text:style-name="P9"/>
      <table:table table:name="Tabla4" table:style-name="Tabla4">
        <table:table-column table:style-name="Tabla4.A"/>
        <table:table-row table:style-name="Tabla4.1">
          <table:table-cell table:style-name="Tabla4.A1" office:value-type="string">
            <text:p text:style-name="P2">🏛️ Patrimonio cultural</text:p>
            <text:p text:style-name="P20">Valoración &gt; 4.0 ⭐ · Contenido educativo/experiencial · Sitios de calidad.</text:p>
          </table:table-cell>
        </table:table-row>
      </table:table>
      <text:p text:style-name="P9"/>
      <table:table table:name="Tabla5" table:style-name="Tabla5">
        <table:table-column table:style-name="Tabla5.A"/>
        <table:table-row table:style-name="Tabla5.1">
          <table:table-cell table:style-name="Tabla5.A1" office:value-type="string">
            <text:p text:style-name="P2">🎪 Eventos</text:p>
            <text:p text:style-name="P20">Filtrado por fecha · Verificación de datos · Eventos históricos para variedad.</text:p>
          </table:table-cell>
        </table:table-row>
      </table:table>
      <text:h text:style-name="P23" text:outline-level="2">3.2 Estandarización de Taxonomía</text:h>
      <text:p text:style-name="P8">Se definió una taxonomía unificada de 28 categorías que agrupa los tres tipos de contenido (gastronomía, patrimonio, eventos). Cada ítem recibe un identificador numérico (id_interes) que lo mapea a su categoría en esta taxonomía global.</text:p>
      <text:p text:style-name="P8">Los sellos de calidad (Denominación de Origen, Eusko Label, Euskal Baserri, Agricultura Ecológica, Michelin, Repsol) se codifican como características adicionales para enriquecer los perfiles de los ítems.</text:p>
      <text:h text:style-name="P23" text:outline-level="2">3.3 Validación de Datos</text:h>
      <text:p text:style-name="P7"><text:span text:style-name="T1">Se implementó un script de validación (validar_datos.py) que ejecuta después de cada fase de limpieza. </text:span><text:soft-page-break/><text:span text:style-name="T1">Este script comprueba:</text:span></text:p>
      <table:table table:name="Tabla6" table:style-name="Tabla6">
        <table:table-column table:style-name="Tabla6.A"/>
        <table:table-row table:style-name="Tabla6.1">
          <table:table-cell table:style-name="Tabla6.A1" office:value-type="string">
            <text:p text:style-name="P5">✓ Integridad referencial: ningún ítem con provincia o categoría nula o inválida.</text:p>
            <text:p text:style-name="P5">✓ Duplicados: no hay item_id repetidos dentro de un CSV o entre CSV (usando prefijos: g-, p-, e-).</text:p>
            <text:p text:style-name="P20">✓ Rango de valoraciones: todas entre 1–5; se imputan los nulos a la media histórica (4.3).</text:p>
          </table:table-cell>
        </table:table-row>
      </table:table>
      <text:h text:style-name="P23" text:outline-level="2">3.4 Persistencia en Base de Datos Compartida</text:h>
      <text:p text:style-name="P8">Tras la limpieza y validación, los catálogos dejan de gestionarse únicamente como ficheros CSV y se vuelcan a la base de datos PostgreSQL compartida con el equipo de Full Stack, que pasa a ser la fuente de verdad del proyecto. El chatbot puede seguir leyendo de los CSV como snapshot resiliente (DATA_SOURCE = csv) o directamente de la base compartida (DATA_SOURCE = db), sin cambiar el código.</text:p>
      <text:p text:style-name="P8">Se incorporó además la tabla de los 252 municipios del País Vasco con sus códigos INE oficiales (como nora_code), el código de provincia y las coordenadas de centroide del IGN. El campo nora_code se mantiene como texto para preservar los ceros a la izquierda de los códigos de Araba. El detalle de esta integración se describe en la Sección 8.4.</text:p>
      <text:h text:style-name="P25" text:outline-level="1">4. Análisis Exploratorio de Datos (EDA)</text:h>
      <text:h text:style-name="P23" text:outline-level="2">4.1 Distribución por Provincia</text:h>
      <text:p text:style-name="P8">El catálogo está bien distribuido entre las tres provincias: Bizkaia (~45%), Gipuzkoa (~35%), Araba (~20%). Esta distribución refleja la densidad real de oferta cultural y gastronómica del País Vasco.</text:p>
      <text:h text:style-name="P23" text:outline-level="2">4.2 Distribución Temática</text:h>
      <text:p text:style-name="P8">Las categorías más representadas son Restaurantes, Eventos Culturales Variados, Bodegas y Museos. Las categorías menos comunes (Bertsolarismo, Concursos) tienen presencia pero limitada, lo que requiere especial cuidado en la evaluación de cold-start.</text:p>
      <text:h text:style-name="P23" text:outline-level="2">4.3 Valoración</text:h>
      <text:p text:style-name="P8">La distribución de valoraciones es sesgada hacia calificaciones altas (media: 4.3 ⭐). Esto es consistente con el filtrado previo (&gt; 4.0) y refleja la calidad del catálogo; sin embargo, reduce la varianza en el espacio de características para la recomendación.</text:p>
      <text:h text:style-name="P25" text:outline-level="1">5. Arquitectura de Recomendación</text:h>
      <text:p text:style-name="P8">El sistema combina dos enfoques complementarios por cada categoría de contenido:</text:p>
      <table:table table:name="Tabla7" table:style-name="Tabla7">
        <table:table-column table:style-name="Tabla7.A"/>
        <table:table-row table:style-name="Tabla7.1">
          <table:table-cell table:style-name="Tabla7.A1" office:value-type="string">
            <text:p text:style-name="P2">Filtrado colaborativo (SVD)</text:p>
            <text:p text:style-name="P20">Cuando el usuario ya tiene histórico de reseñas, se factoriza la matriz usuario × ítem para capturar patrones latentes de gusto compartidos entre usuarios similares.</text:p>
          </table:table-cell>
        </table:table-row>
      </table:table>
      <text:p text:style-name="P9"/>
      <table:table table:name="Tabla8" table:style-name="Tabla8">
        <table:table-column table:style-name="Tabla8.A"/>
        <table:table-row table:style-name="Tabla8.1">
          <table:table-cell table:style-name="Tabla8.A1" office:value-type="string">
            <text:p text:style-name="P2">Filtrado por contenido (GradientBoosting)</text:p>
            <text:p text:style-name="P20">Basado en características explícitas del ítem (categoría, provincia, sellos) y del usuario (preferencias, ubicación, afinidad extendida). Cubre el cold-start y los ítems nuevos sin reseñas.</text:p>
          </table:table-cell>
        </table:table-row>
      </table:table>
      <text:p text:style-name="P10"/>
      <text:p text:style-name="P8">La puntuación final es una combinación lineal ponderada:</text:p>
      <text:p text:style-name="P21">score = α × SVD + (1 − α) × Contenido</text:p>
      <text:p text:style-name="P8"><text:soft-page-break/>El peso α se selecciona empíricamente por categoría barriendo valores de 0 a 1 y midiendo el RMSE sobre un conjunto de validación común. El valor óptimo varía según la densidad de interacciones disponibles en cada categoría (ver Sección 7).</text:p>
      <text:h text:style-name="P25" text:outline-level="1">6. Modelos de Recomendación</text:h>
      <text:p text:style-name="P8">El sistema implementa SEIS MODELOS: dos componentes por cada categoría de contenido (Gastronomía, Patrimonio, Eventos). Cada categoría combina un componente colaborativo (SVD) para usuarios con histórico y un componente de contenido (GradientBoosting) para el cold-start.</text:p>
      <text:h text:style-name="P23" text:outline-level="2">6.1 Componente colaborativo — SVD</text:h>
      <text:p text:style-name="P8">El componente colaborativo se implementa con la librería scikit-surprise, empleando el algoritmo SVD (factorización matricial tipo Funk SVD). La entrada son tripletas (user_id, item_id, puntuación) con escala de valoración 1–5 (Reader rating_scale=(1,5)).</text:p>
      <text:p text:style-name="P8">Configuración común a las tres categorías:</text:p>
      <text:list xml:id="list4086105680467529745" text:style-name="WWNum2">
        <text:list-item>
          <text:p text:style-name="P27">Factores latentes: n_factors = 50.</text:p>
        </text:list-item>
        <text:list-item>
          <text:p text:style-name="P27">Épocas de entrenamiento: n_epochs = 30.</text:p>
        </text:list-item>
        <text:list-item>
          <text:p text:style-name="P27">Semilla fija: random_state = 42 (reproducibilidad).</text:p>
        </text:list-item>
        <text:list-item>
          <text:p text:style-name="P27">Selección de algoritmo mediante validación cruzada 5-fold (RMSE y MAE) frente a BaselineOnly, KNNWithMeans y NMF.</text:p>
        </text:list-item>
        <text:list-item>
          <text:p text:style-name="P27">Entrenamiento final sobre el dataset completo (build_full_trainset) para el modelo de producción.</text:p>
        </text:list-item>
      </text:list>
      <text:p text:style-name="P8">Es el modelo principal cuando el usuario ya ha generado reseñas dentro de la aplicación, puesto que captura la señal colaborativa de usuarios con gustos similares.</text:p>
      <text:h text:style-name="P23" text:outline-level="2">6.2 Componente de contenido y cold-start — GradientBoosting</text:h>
      <text:p text:style-name="P8">Para usuarios nuevos sin histórico (y para ítems recién publicados sin reseñas, como eventos futuros) se usa un GradientBoostingRegressor de scikit-learn dentro de un Pipeline con imputación por mediana (SimpleImputer). Este componente se apoya en el feature engineering del proyecto:</text:p>
      <text:list xml:id="list30619358" text:continue-numbering="true" text:style-name="WWNum2">
        <text:list-item>
          <text:p text:style-name="P27">Intereses del usuario procedentes del formulario de onboarding (vector de intereses).</text:p>
        </text:list-item>
        <text:list-item>
          <text:p text:style-name="P27">Características one-hot del ítem: tipo de lugar, provincia, sellos de calidad.</text:p>
        </text:list-item>
        <text:list-item>
          <text:p text:style-name="P27">Afinidad extendida: producto interés del usuario × tipo de ítem.</text:p>
        </text:list-item>
      </text:list>
      <text:p text:style-name="P8">En eventos se incorporan además señales temporales y de precio genuinamente independientes: month, weekday, is_weekend, is_free, online y price_eur transformado con log1p y recorte (clipping) al percentil 95 para neutralizar outliers extremos de precio.</text:p>
      <text:h text:style-name="P23" text:outline-level="2">6.3 Combinación híbrida</text:h>
      <text:p text:style-name="P8">Ambos componentes se combinan linealmente con score = α × SVD + (1 − α) × Contenido. El α óptimo se busca empíricamente por categoría. En patrimonio el barrido converge a α = 1.0 (SVD puro), lo que indica que, con la densidad de interacciones disponible, el componente colaborativo ya captura la totalidad de la señal aprendible; el componente de contenido se mantiene de todos modos por su valor en cold-start y explicabilidad.</text:p>
      <text:h text:style-name="P23" text:outline-level="2"><text:soft-page-break/>6.4 Mapa de los seis modelos</text:h>
      <table:table table:name="Tabla9" table:style-name="Tabla9">
        <table:table-column table:style-name="Tabla9.A"/>
        <table:table-column table:style-name="Tabla9.B"/>
        <table:table-column table:style-name="Tabla9.C"/>
        <table:table-header-rows>
          <table:table-row table:style-name="Tabla9.1">
            <table:table-cell table:style-name="Tabla9.A1" office:value-type="string">
              <text:p text:style-name="P16">Categoría</text:p>
            </table:table-cell>
            <table:table-cell table:style-name="Tabla9.A1" office:value-type="string">
              <text:p text:style-name="P16">Caso de uso</text:p>
            </table:table-cell>
            <table:table-cell table:style-name="Tabla9.A1" office:value-type="string">
              <text:p text:style-name="P16">Técnica</text:p>
            </table:table-cell>
          </table:table-row>
        </table:table-header-rows>
        <table:table-row table:style-name="Tabla9.1">
          <table:table-cell table:style-name="Tabla9.A2" office:value-type="string">
            <text:p text:style-name="P19">🍴 Gastronomía</text:p>
          </table:table-cell>
          <table:table-cell table:style-name="Tabla9.A2" office:value-type="string">
            <text:p text:style-name="P18">Usuario nuevo (cold-start)</text:p>
          </table:table-cell>
          <table:table-cell table:style-name="Tabla9.A2" office:value-type="string">
            <text:p text:style-name="P18">GradientBoosting (contenido)</text:p>
          </table:table-cell>
        </table:table-row>
        <table:table-row table:style-name="Tabla9.1">
          <table:table-cell table:style-name="Tabla9.A2" office:value-type="string">
            <text:p text:style-name="P19">🍴 Gastronomía</text:p>
          </table:table-cell>
          <table:table-cell table:style-name="Tabla9.A2" office:value-type="string">
            <text:p text:style-name="P18">Usuario con histórico</text:p>
          </table:table-cell>
          <table:table-cell table:style-name="Tabla9.A2" office:value-type="string">
            <text:p text:style-name="P18">SVD (colaborativo)</text:p>
          </table:table-cell>
        </table:table-row>
        <table:table-row table:style-name="Tabla9.1">
          <table:table-cell table:style-name="Tabla9.A2" office:value-type="string">
            <text:p text:style-name="P19">🏛️ Patrimonio</text:p>
          </table:table-cell>
          <table:table-cell table:style-name="Tabla9.A2" office:value-type="string">
            <text:p text:style-name="P18">Usuario nuevo (cold-start)</text:p>
          </table:table-cell>
          <table:table-cell table:style-name="Tabla9.A2" office:value-type="string">
            <text:p text:style-name="P18">GradientBoosting (contenido)</text:p>
          </table:table-cell>
        </table:table-row>
        <table:table-row table:style-name="Tabla9.1">
          <table:table-cell table:style-name="Tabla9.A2" office:value-type="string">
            <text:p text:style-name="P19">🏛️ Patrimonio</text:p>
          </table:table-cell>
          <table:table-cell table:style-name="Tabla9.A2" office:value-type="string">
            <text:p text:style-name="P18">Usuario con histórico</text:p>
          </table:table-cell>
          <table:table-cell table:style-name="Tabla9.A2" office:value-type="string">
            <text:p text:style-name="P18">SVD (colaborativo)</text:p>
          </table:table-cell>
        </table:table-row>
        <table:table-row table:style-name="Tabla9.1">
          <table:table-cell table:style-name="Tabla9.A2" office:value-type="string">
            <text:p text:style-name="P19">🎪 Eventos</text:p>
          </table:table-cell>
          <table:table-cell table:style-name="Tabla9.A2" office:value-type="string">
            <text:p text:style-name="P18">Usuario nuevo / evento sin reseñas</text:p>
          </table:table-cell>
          <table:table-cell table:style-name="Tabla9.A2" office:value-type="string">
            <text:p text:style-name="P18">GradientBoosting (contenido)</text:p>
          </table:table-cell>
        </table:table-row>
        <table:table-row table:style-name="Tabla9.1">
          <table:table-cell table:style-name="Tabla9.A2" office:value-type="string">
            <text:p text:style-name="P19">🎪 Eventos</text:p>
          </table:table-cell>
          <table:table-cell table:style-name="Tabla9.A2" office:value-type="string">
            <text:p text:style-name="P18">Usuario con histórico</text:p>
          </table:table-cell>
          <table:table-cell table:style-name="Tabla9.A2" office:value-type="string">
            <text:p text:style-name="P18">SVD (colaborativo)</text:p>
          </table:table-cell>
        </table:table-row>
      </table:table>
      <text:p text:style-name="P10"/>
      <table:table table:name="Tabla10" table:style-name="Tabla10">
        <table:table-column table:style-name="Tabla10.A"/>
        <table:table-row table:style-name="Tabla10.1">
          <table:table-cell table:style-name="Tabla10.A1" office:value-type="string">
            <text:p text:style-name="P2">Nota sobre eventos</text:p>
            <text:p text:style-name="P20">Al igual que en gastronomía y patrimonio, los datos de este bloque se han generado de forma sintética en reviews_event.csv (83.485 reseñas, 2.000 usuarios × 2.744 eventos, densidad ≈ 1,5%). Sin embargo, conceptualmente representan un histórico de eventos pasados ya finalizados. Esta distinción es clave para el filtrado colaborativo: permite modelar las preferencias de los usuarios sobre experiencias anteriores y, mediante técnicas de similitud, predecir la valoración o aceptación de los nuevos eventos del catálogo antes de que se celebren.</text:p>
          </table:table-cell>
        </table:table-row>
      </table:table>
      <text:h text:style-name="P25" text:outline-level="1">7. Evaluación y Validación</text:h>
      <text:h text:style-name="P23" text:outline-level="2">7.1 Metodología</text:h>
      <text:p text:style-name="P8">La evaluación se estructura en dos fases. Primero, una selección de algoritmo mediante validación cruzada 5-fold que compara los candidatos colaborativos (BaselineOnly, KNNWithMeans, SVD, NMF). Segundo, una comparación SVD vs. Contenido sobre un mismo split 80/20 (train/test) para garantizar una evaluación justa entre ambos componentes. La métrica principal es el RMSE, complementada por el MAE.</text:p>
      <text:h text:style-name="P23" text:outline-level="2">7.2 Selección de algoritmo (validación cruzada 5-fold)</text:h>
      <text:p text:style-name="P8">En las tres categorías, SVD es el mejor algoritmo colaborativo del conjunto evaluado. RMSE medio (menor es mejor):</text:p>
      <table:table table:name="Tabla11" table:style-name="Tabla11">
        <table:table-column table:style-name="Tabla11.A"/>
        <table:table-column table:style-name="Tabla11.B"/>
        <table:table-column table:style-name="Tabla11.C"/>
        <table:table-header-rows>
          <table:table-row table:style-name="Tabla11.1">
            <table:table-cell table:style-name="Tabla11.A1" office:value-type="string">
              <text:p text:style-name="P16">Algoritmo</text:p>
            </table:table-cell>
            <table:table-cell table:style-name="Tabla11.A1" office:value-type="string">
              <text:p text:style-name="P15">Gastronomía</text:p>
            </table:table-cell>
            <table:table-cell table:style-name="Tabla11.A1" office:value-type="string">
              <text:p text:style-name="P15">Eventos</text:p>
            </table:table-cell>
          </table:table-row>
        </table:table-header-rows>
        <table:table-row table:style-name="Tabla11.1">
          <table:table-cell table:style-name="Tabla11.A2" office:value-type="string">
            <text:p text:style-name="P19">BaselineOnly</text:p>
          </table:table-cell>
          <table:table-cell table:style-name="Tabla11.A2" office:value-type="string">
            <text:p text:style-name="P17">1.0200</text:p>
          </table:table-cell>
          <table:table-cell table:style-name="Tabla11.A2" office:value-type="string">
            <text:p text:style-name="P17">1.1467</text:p>
          </table:table-cell>
        </table:table-row>
        <table:table-row table:style-name="Tabla11.1">
          <table:table-cell table:style-name="Tabla11.A2" office:value-type="string">
            <text:p text:style-name="P19">KNNWithMeans</text:p>
          </table:table-cell>
          <table:table-cell table:style-name="Tabla11.A2" office:value-type="string">
            <text:p text:style-name="P17">1.1317</text:p>
          </table:table-cell>
          <table:table-cell table:style-name="Tabla11.A2" office:value-type="string">
            <text:p text:style-name="P17">1.3609</text:p>
          </table:table-cell>
        </table:table-row>
        <table:table-row table:style-name="Tabla11.1">
          <table:table-cell table:style-name="Tabla11.A2" office:value-type="string">
            <text:p text:style-name="P19">SVD ✓</text:p>
          </table:table-cell>
          <table:table-cell table:style-name="Tabla11.A2" office:value-type="string">
            <text:p text:style-name="P17">1.0490</text:p>
          </table:table-cell>
          <table:table-cell table:style-name="Tabla11.A2" office:value-type="string">
            <text:p text:style-name="P17">1.1734</text:p>
          </table:table-cell>
        </table:table-row>
        <table:table-row table:style-name="Tabla11.1">
          <table:table-cell table:style-name="Tabla11.A2" office:value-type="string">
            <text:p text:style-name="P19">NMF</text:p>
          </table:table-cell>
          <table:table-cell table:style-name="Tabla11.A2" office:value-type="string">
            <text:p text:style-name="P17">1.2349</text:p>
          </table:table-cell>
          <table:table-cell table:style-name="Tabla11.A2" office:value-type="string">
            <text:p text:style-name="P17">1.2876</text:p>
          </table:table-cell>
        </table:table-row>
      </table:table>
      <text:p text:style-name="P11"/>
      <text:p text:style-name="P8">En patrimonio, SVD obtiene en validación cruzada 5-fold un RMSE de 0.8399 ± 0.0148 y un MAE de 0.6444, confirmando el mismo patrón.</text:p>
      <text:h text:style-name="P23" text:outline-level="2">7.3 Rendimiento del modelo final (test hold-out 80/20)</text:h>
      <text:p text:style-name="P8">Comparación de los dos componentes sobre el conjunto de test, por categoría (RMSE / MAE):</text:p>
      <table:table table:name="Tabla12" table:style-name="Tabla12">
        <table:table-column table:style-name="Tabla12.A"/>
        <table:table-column table:style-name="Tabla12.B"/>
        <table:table-column table:style-name="Tabla12.C"/>
        <table:table-header-rows>
          <table:table-row table:style-name="Tabla12.1">
            <table:table-cell table:style-name="Tabla12.A1" office:value-type="string">
              <text:p text:style-name="P16">Categoría</text:p>
            </table:table-cell>
            <table:table-cell table:style-name="Tabla12.A1" office:value-type="string">
              <text:p text:style-name="P15">SVD (RMSE / MAE)</text:p>
            </table:table-cell>
            <table:table-cell table:style-name="Tabla12.A1" office:value-type="string">
              <text:p text:style-name="P15">Contenido (RMSE / MAE)</text:p>
            </table:table-cell>
          </table:table-row>
        </table:table-header-rows>
        <table:table-row table:style-name="Tabla12.1">
          <table:table-cell table:style-name="Tabla12.A2" office:value-type="string">
            <text:p text:style-name="P19">🏛️ Patrimonio</text:p>
          </table:table-cell>
          <table:table-cell table:style-name="Tabla12.A2" office:value-type="string">
            <text:p text:style-name="P17">0.6017 / 0.4602</text:p>
          </table:table-cell>
          <table:table-cell table:style-name="Tabla12.A2" office:value-type="string">
            <text:p text:style-name="P17">0.8441 / 0.6231</text:p>
          </table:table-cell>
        </table:table-row>
        <table:table-row table:style-name="Tabla12.1">
          <table:table-cell table:style-name="Tabla12.A2" office:value-type="string">
            <text:p text:style-name="P19">🍴 Gastronomía</text:p>
          </table:table-cell>
          <table:table-cell table:style-name="Tabla12.A2" office:value-type="string">
            <text:p text:style-name="P17">0.7595 / 0.5861</text:p>
          </table:table-cell>
          <table:table-cell table:style-name="Tabla12.A2" office:value-type="string">
            <text:p text:style-name="P17">0.9900 / 0.7456</text:p>
          </table:table-cell>
        </table:table-row>
        <table:table-row table:style-name="Tabla12.1">
          <table:table-cell table:style-name="Tabla12.A2" office:value-type="string">
            <text:p text:style-name="P19">🎪 Eventos</text:p>
          </table:table-cell>
          <table:table-cell table:style-name="Tabla12.A2" office:value-type="string">
            <text:p text:style-name="P17">0.8210 / 0.6445</text:p>
          </table:table-cell>
          <table:table-cell table:style-name="Tabla12.A2" office:value-type="string">
            <text:p text:style-name="P17">1.1250 / 0.8401</text:p>
          </table:table-cell>
        </table:table-row>
      </table:table>
      <text:h text:style-name="P23" text:outline-level="2">7.4 Análisis de resultados</text:h>
      <text:list xml:id="list30617853" text:continue-numbering="true" text:style-name="WWNum2">
        <text:list-item>
          <text:p text:style-name="P27">SVD supera de forma consistente al componente de contenido en RMSE y MAE en las tres categorías, por lo que es el modelo principal siempre que el usuario tenga histórico.</text:p>
        </text:list-item>
        <text:list-item>
          <text:p text:style-name="P27"><text:soft-page-break/>El componente de contenido (GradientBoosting) presenta un RMSE mayor, pero es imprescindible: es el único capaz de recomendar a usuarios nuevos y a ítems sin reseñas (especialmente eventos futuros).</text:p>
        </text:list-item>
        <text:list-item>
          <text:p text:style-name="P27">Suelo de ruido en eventos: la desviación estándar natural de las puntuaciones (Std ≈ 1.13) marca el límite inferior alcanzable. Con un RMSE de SVD ≈ 0.82, el modelo ya opera por debajo de esa cota, señal de que extrae prácticamente toda la señal aprendible; el margen restante está dominado por el ruido intrínseco de los datos, no por la elección de hiperparámetros.</text:p>
        </text:list-item>
        <text:list-item>
          <text:p text:style-name="P27">El α óptimo = 1.0 en patrimonio confirma que, con densidad de interacciones suficiente, el colaborativo domina; en categorías más dispersas el componente de contenido aporta mayor valor relativo.</text:p>
        </text:list-item>
      </text:list>
      <text:h text:style-name="P25" text:outline-level="1">8. Integración: Chatbot, API de Recomendación y Backend Full Stack</text:h>
      <text:p text:style-name="P8">El sistema de recomendación no funciona de forma aislada: se ha desplegado como un conjunto de servicios coordinados que comparten una misma base de datos con el equipo de Full Stack. Esta sección documenta la arquitectura de integración resultante —la API que expone los modelos, el servicio de chatbot conversacional y el volcado de los catálogos a la base compartida— así como el trabajo de coordinación de endpoints y campos que garantiza la compatibilidad entre verticales.</text:p>
      <text:h text:style-name="P23" text:outline-level="2">8.1 Arquitectura de integración (topología de servicios)</text:h>
      <text:p text:style-name="P8">La solución se articula en tres servicios independientes, cada uno con una responsabilidad clara, que conversan entre sí mediante API REST y comparten una única base de datos PostgreSQL como fuente de verdad:</text:p>
      <table:table table:name="Tabla13" table:style-name="Tabla13">
        <table:table-column table:style-name="Tabla13.A"/>
        <table:table-column table:style-name="Tabla13.B"/>
        <table:table-column table:style-name="Tabla13.C"/>
        <table:table-header-rows>
          <table:table-row table:style-name="Tabla13.1">
            <table:table-cell table:style-name="Tabla13.A1" office:value-type="string">
              <text:p text:style-name="P16">Servicio</text:p>
            </table:table-cell>
            <table:table-cell table:style-name="Tabla13.A1" office:value-type="string">
              <text:p text:style-name="P16">Responsable</text:p>
            </table:table-cell>
            <table:table-cell table:style-name="Tabla13.A1" office:value-type="string">
              <text:p text:style-name="P16">Rol</text:p>
            </table:table-cell>
          </table:table-row>
        </table:table-header-rows>
        <table:table-row table:style-name="Tabla13.1">
          <table:table-cell table:style-name="Tabla13.A2" office:value-type="string">
            <text:p text:style-name="P19">Backend principal (Flask · :5000)</text:p>
          </table:table-cell>
          <table:table-cell table:style-name="Tabla13.A2" office:value-type="string">
            <text:p text:style-name="P18">Full Stack</text:p>
          </table:table-cell>
          <table:table-cell table:style-name="Tabla13.A2" office:value-type="string">
            <text:p text:style-name="P18">Autenticación, perfil de usuario, preferencias, intereses, reseñas, municipios y eventos. Persiste en PostgreSQL.</text:p>
          </table:table-cell>
        </table:table-row>
        <table:table-row table:style-name="Tabla13.1">
          <table:table-cell table:style-name="Tabla13.A2" office:value-type="string">
            <text:p text:style-name="P19">API de recomendación (recsys)</text:p>
          </table:table-cell>
          <table:table-cell table:style-name="Tabla13.A2" office:value-type="string">
            <text:p text:style-name="P18">Data Science</text:p>
          </table:table-cell>
          <table:table-cell table:style-name="Tabla13.A2" office:value-type="string">
            <text:p text:style-name="P18">Expone los seis modelos entrenados como endpoints REST y devuelve recomendaciones de lugares y eventos con puntuación calibrada (1–5).</text:p>
          </table:table-cell>
        </table:table-row>
        <table:table-row table:style-name="Tabla13.1">
          <table:table-cell table:style-name="Tabla13.A2" office:value-type="string">
            <text:p text:style-name="P19">Orquestador / chatbot (Flask · :5001)</text:p>
          </table:table-cell>
          <table:table-cell table:style-name="Tabla13.A2" office:value-type="string">
            <text:p text:style-name="P18">Data Science</text:p>
          </table:table-cell>
          <table:table-cell table:style-name="Tabla13.A2" office:value-type="string">
            <text:p text:style-name="P18">Traduce el lenguaje natural, llama a la API de recomendación, personaliza con datos del backend y redacta la respuesta para el cliente.</text:p>
          </table:table-cell>
        </table:table-row>
      </table:table>
      <text:p text:style-name="P10"/>
      <table:table table:name="Tabla14" table:style-name="Tabla14">
        <table:table-column table:style-name="Tabla14.A"/>
        <table:table-row table:style-name="Tabla14.1">
          <table:table-cell table:style-name="Tabla14.A1" office:value-type="string">
            <text:p text:style-name="P2">Flujo de datos</text:p>
            <text:p text:style-name="P20">Cliente → Chatbot (Flask): el LLM traduce la petición → API de recomendación (modelos): calcula la predicción → Chatbot: el LLM redacta la respuesta → Cliente. En paralelo, el chatbot consulta al backend de Full Stack los intereses y preferencias del usuario para personalizar la recomendación. Todos los servicios leen del mismo PostgreSQL.</text:p>
          </table:table-cell>
        </table:table-row>
      </table:table>
      <text:h text:style-name="P23" text:outline-level="2">8.2 API de Recomendación: exponer los modelos como servicio</text:h>
      <text:p text:style-name="P8">Para que los modelos dejaran de ser notebooks y pasaran a ser consumibles por el resto del equipo, se ha levantado una API REST que los envuelve tras un contrato estable. El chatbot —y, en general, cualquier cliente— obtiene recomendaciones por HTTP sin conocer los detalles internos de los modelos. Los endpoints principales son:</text:p>
      <text:list xml:id="list30623684" text:continue-numbering="true" text:style-name="WWNum2">
        <text:list-item>
          <text:p text:style-name="P28"><text:span text:style-name="T2">GET /recommendations/places</text:span><text:span text:style-name="T1">?provincia=&amp;intereses=&amp;top_n= — recomienda lugares fijos (gastronomía, patrimonio).</text:span></text:p>
        </text:list-item>
        <text:list-item>
          <text:p text:style-name="P28"><text:span text:style-name="T2">GET /recommendations/events</text:span><text:span text:style-name="T1">?provincia=&amp;intereses=&amp;fecha_inicio=&amp;fecha_fin=&amp;top_n= — recomienda eventos en un rango de fechas.</text:span></text:p>
        </text:list-item>
        <text:list-item>
          <text:p text:style-name="P28"><text:soft-page-break/><text:span text:style-name="T2">GET /taxonomy</text:span><text:span text:style-name="T1"> — devuelve el catálogo completo de las 29 categorías de interés (gastronomía, patrimonio y eventos) con sus identificadores numéricos, de modo que el chatbot, el frontend y el backend puedan validar y traducir intereses dinámicamente sin hardcodear la lista en su código. </text:span></text:p>
        </text:list-item>
        <text:list-item>
          <text:p text:style-name="P28"><text:span text:style-name="T2">GET /health</text:span><text:span text:style-name="T1"> — devuelve el estado operativo de la API de recomendación. Lo usan el orquestador del chatbot y el backend para verificar que el servicio está levantado antes de lanzar llamadas, y para detectar caídas de forma temprana en lugar de recibir errores silenciosos. </text:span></text:p>
        </text:list-item>
      </text:list>
      <text:p text:style-name="P9"/>
      <text:p text:style-name="P8">Todas las respuestas comparten un mismo envelope por ítem: item_id, nombre, tipo (lugar | evento), categoría, provincia, municipio, estrella_prevista (escala común 1–5) y url. Este formato único es el que el chatbot espera y el que cualquier consumidor recibe, sea cual sea la categoría.</text:p>
      <text:p text:style-name="P3"/>
      <table:table table:name="Tabla15" table:style-name="Tabla15">
        <table:table-column table:style-name="Tabla15.A"/>
        <table:table-row table:style-name="Tabla15.1">
          <table:table-cell table:style-name="Tabla15.A1" office:value-type="string">
            <text:p text:style-name="P2">Diseño por contrato (contract-first)</text:p>
            <text:p text:style-name="P20">Se definió primero el envelope de respuesta y los endpoints, y se entregó un stub que los cumplía exactamente. Así, Full Stack pudo integrar contra la API antes de que los modelos reales estuvieran desplegados. El paso a producción consiste únicamente en apuntar la variable MODEL_API_URL a la API real: no cambia ni una línea del orquestador ni del contrato. Además, el chatbot opera en modo HTTP estricto —si la API no responde, avisa de forma explícita en lugar de degradar en silencio—, lo que facilita depurar la integración entre equipos.</text:p>
          </table:table-cell>
        </table:table-row>
      </table:table>
      <text:h text:style-name="P23" text:outline-level="2">8.3 Chatbot conversacional: lenguaje natural en ambos sentidos</text:h>
      <text:p text:style-name="P8">El chatbot es el punto de entrada conversacional de SustraiApp. Incorpora un modelo de lenguaje ejecutado en local mediante Ollama (llama3.1:8b) que actúa como traductor bidireccional entre el usuario y los modelos de recomendación: convierte la petición en lenguaje natural en una llamada estructurada y, después, convierte la predicción de los modelos de nuevo en lenguaje natural. El flujo completo de un turno es:</text:p>
      <table:table table:name="Tabla16" table:style-name="Tabla16">
        <table:table-column table:style-name="Tabla16.A"/>
        <table:table-column table:style-name="Tabla16.B"/>
        <table:table-header-rows>
          <table:table-row table:style-name="Tabla16.1">
            <table:table-cell table:style-name="Tabla16.A1" office:value-type="string">
              <text:p text:style-name="P15">#</text:p>
            </table:table-cell>
            <table:table-cell table:style-name="Tabla16.A1" office:value-type="string">
              <text:p text:style-name="P16">Paso</text:p>
            </table:table-cell>
          </table:table-row>
        </table:table-header-rows>
        <table:table-row table:style-name="Tabla16.1">
          <table:table-cell table:style-name="Tabla16.A2" office:value-type="string">
            <text:p text:style-name="P17">1</text:p>
          </table:table-cell>
          <table:table-cell table:style-name="Tabla16.A2" office:value-type="string">
            <text:p text:style-name="P18">Traducir (entrada): el LLM convierte la petición del usuario en una llamada de herramienta (function calling) con provincia, intereses (ids de taxonomía), fechas e intención.</text:p>
          </table:table-cell>
        </table:table-row>
        <table:table-row table:style-name="Tabla16.1">
          <table:table-cell table:style-name="Tabla16.A2" office:value-type="string">
            <text:p text:style-name="P17">2</text:p>
          </table:table-cell>
          <table:table-cell table:style-name="Tabla16.A2" office:value-type="string">
            <text:p text:style-name="P18">Grounding: el servidor revalida y corrige contra la taxonomía y los gazetteers. Las fechas se calculan en el servidor, nunca las inventa el LLM, y se descartan las categorías inexistentes.</text:p>
          </table:table-cell>
        </table:table-row>
        <table:table-row table:style-name="Tabla16.1">
          <table:table-cell table:style-name="Tabla16.A2" office:value-type="string">
            <text:p text:style-name="P17">3</text:p>
          </table:table-cell>
          <table:table-cell table:style-name="Tabla16.A2" office:value-type="string">
            <text:p text:style-name="P18">Recomendar: se llama a la API de recomendación con los parámetros ya validados y se recoge la predicción de los modelos.</text:p>
          </table:table-cell>
        </table:table-row>
        <table:table-row table:style-name="Tabla16.1">
          <table:table-cell table:style-name="Tabla16.A2" office:value-type="string">
            <text:p text:style-name="P17">4</text:p>
          </table:table-cell>
          <table:table-cell table:style-name="Tabla16.A2" office:value-type="string">
            <text:p text:style-name="P18">Redactar (salida): el LLM convierte los ítems devueltos en una sugerencia breve y concreta en lenguaje natural, usando solo los resultados reales.</text:p>
          </table:table-cell>
        </table:table-row>
        <table:table-row table:style-name="Tabla16.1">
          <table:table-cell table:style-name="Tabla16.A2" office:value-type="string">
            <text:p text:style-name="P17">5</text:p>
          </table:table-cell>
          <table:table-cell table:style-name="Tabla16.A2" office:value-type="string">
            <text:p text:style-name="P18">Responder: JSON con el texto, los ítems estructurados y los metadatos de la consulta.</text:p>
          </table:table-cell>
        </table:table-row>
      </table:table>
      <text:p text:style-name="P10"/>
      <text:p text:style-name="P8">El servicio incorpora además una memoria de sesión que recuerda la provincia y los intereses del turno anterior (sin almacenar texto ni datos personales), de modo que un seguimiento como «¿y mañana?» o «¿y en Donosti?» no pierde el contexto. Si la petición incluye un user_id, el chatbot hereda los intereses guardados del usuario en el backend de Full Stack para personalizar la respuesta.</text:p>
      <text:p text:style-name="P3"/>
      <table:table table:name="Tabla17" table:style-name="Tabla17">
        <table:table-column table:style-name="Tabla17.A"/>
        <table:table-row table:style-name="Tabla17.1">
          <table:table-cell table:style-name="Tabla17.A1" office:value-type="string">
            <text:p text:style-name="P2">Doble traducción, decisión en los modelos</text:p>
            <text:p text:style-name="P20">El LLM nunca decide la recomendación: traduce la petición a parámetros y, después, traduce los resultados a lenguaje natural. La recomendación la calculan siempre los modelos, y el grounding en servidor evita que el LLM invente categorías, provincias o fechas. Al ejecutarse el LLM en local, no hay coste por token ni se envían datos del usuario a terceros.</text:p>
          </table:table-cell>
        </table:table-row>
      </table:table>
      <text:h text:style-name="P23" text:outline-level="2"><text:soft-page-break/>8.4 Base de datos compartida: volcado de los catálogos a PostgreSQL</text:h>
      <text:p text:style-name="P8">Los catálogos de Data Science (gastronomía, patrimonio y eventos), que durante el desarrollo vivían como ficheros CSV, se han volcado a la base de datos PostgreSQL que mantiene el equipo de Full Stack. Con ello se elimina la duplicación de datos: ambos equipos leen de la misma base, que pasa a ser la única fuente de verdad del proyecto.</text:p>
      <text:list xml:id="list30623035" text:continue-numbering="true" text:style-name="WWNum2">
        <text:list-item>
          <text:p text:style-name="P28"><text:span text:style-name="T2">Doble origen configurable: </text:span><text:span text:style-name="T1">el chatbot puede leer tanto de los CSV (snapshot resiliente) como de la base compartida, sin cambiar el código, según la variable DATA_SOURCE = csv | db.</text:span></text:p>
        </text:list-item>
        <text:list-item>
          <text:p text:style-name="P28"><text:span text:style-name="T2">Carga de municipios: </text:span><text:span text:style-name="T1">se cargaron los 252 municipios del País Vasco con sus códigos INE oficiales (como nora_code), el código de provincia y las coordenadas de centroide del IGN.</text:span></text:p>
        </text:list-item>
        <text:list-item>
          <text:p text:style-name="P28"><text:span text:style-name="T2">Detalle crítico de tipos: </text:span><text:span text:style-name="T1">el código nora_code se mantiene como texto para preservar los ceros a la izquierda de los códigos de Araba, que un tipo entero destruiría.</text:span></text:p>
        </text:list-item>
        <text:list-item>
          <text:p text:style-name="P28"><text:span text:style-name="T2">Validación previa: </text:span><text:span text:style-name="T1">el script validar_datos.py comprueba integridad referencial, ausencia de duplicados y rango de valoraciones antes de la carga.</text:span></text:p>
        </text:list-item>
      </text:list>
      <text:p text:style-name="P3"/>
      <table:table table:name="Tabla18" table:style-name="Tabla18">
        <table:table-column table:style-name="Tabla18.A"/>
        <table:table-row table:style-name="Tabla18.1">
          <table:table-cell table:style-name="Tabla18.A1" office:value-type="string">
            <text:p text:style-name="P2">Disciplina de datos personales</text:p>
            <text:p text:style-name="P20">Solo los catálogos de contenido público se vuelcan a la base compartida. Los ficheros con información personal (correos, teléfonos, hashes de contraseña) ni se versionan en Git ni se cargan, manteniendo la separación entre datos de contenido y datos sensibles de usuario.</text:p>
          </table:table-cell>
        </table:table-row>
      </table:table>
      <text:h text:style-name="P23" text:outline-level="2">8.5 Coordinación de contratos y campos con Full Stack</text:h>
      <text:p text:style-name="P8">Que tres servicios desarrollados por verticales distintas funcionen sobre una misma base sin fricciones exigió un trabajo explícito de coordinación de contratos y campos. Los acuerdos principales con el equipo de Full Stack fueron:</text:p>
      <text:list xml:id="list30626797" text:continue-numbering="true" text:style-name="WWNum2">
        <text:list-item>
          <text:p text:style-name="P28"><text:span text:style-name="T2">Diseño conjunto de endpoints: </text:span><text:span text:style-name="T1">se definieron conjuntamente rutas, parámetros y códigos de estado (documentados en RUTAS_API.md), de forma que el chatbot pudiera consumir el backend —intereses, preferencias, municipios, eventos— y que el backend pudiera consumir la API de recomendación.</text:span></text:p>
        </text:list-item>
        <text:list-item>
          <text:p text:style-name="P28"><text:span text:style-name="T2">Envelope de respuesta unificado: </text:span><text:span text:style-name="T1">el backend envuelve sus respuestas en una clave «data»; el cliente del chatbot la desenvuelve de forma transparente, evitando errores de parseo entre equipos.</text:span></text:p>
        </text:list-item>
        <text:list-item>
          <text:p text:style-name="P28"><text:span text:style-name="T2">Alineación de taxonomías: </text:span><text:span text:style-name="T1">el backend maneja una taxonomía de 17 categorías y el chatbot/recsys una de 29. Se acordó una capa de traducción por nombre (MAPA_INTERES_BACKEND) que convierte los ids de un sistema al otro, de modo que un interés guardado por el usuario se traduce correctamente a los ids que entienden los modelos.</text:span></text:p>
        </text:list-item>
        <text:list-item>
          <text:p text:style-name="P28"><text:span text:style-name="T2">Campos compartidos: </text:span><text:span text:style-name="T1">provincia normalizada (Araba / Bizkaia / Gipuzkoa), municipios con código INE común y escala de valoración 1–5 compartida en todos los servicios.</text:span></text:p>
        </text:list-item>
        <text:list-item>
          <text:p text:style-name="P28"><text:span text:style-name="T2">Resiliencia entre servicios: </text:span><text:span text:style-name="T1">todas las llamadas entre servicios son tolerantes a fallos. Si un servicio no responde, el resto sigue funcionando en modo degradado controlado en lugar de caer.</text:span></text:p>
        </text:list-item>
      </text:list>
      <text:p text:style-name="P9"/>
      <table:table table:name="Tabla19" table:style-name="Tabla19">
        <table:table-column table:style-name="Tabla19.A"/>
        <table:table-row table:style-name="Tabla19.1">
          <table:table-cell table:style-name="Tabla19.A1" office:value-type="string">
            <text:p text:style-name="P2">Resultado</text:p>
            <text:p text:style-name="P20">Una única base de datos, una taxonomía conciliada y contratos de API estables. Esto elimina los problemas de compatibilidad típicos entre verticales —campos con nombres distintos, ids que no casan, formatos de respuesta divergentes— y permite que Front, Back y Data Science evolucionen en paralelo sin romperse mutuamente.</text:p>
          </table:table-cell>
        </table:table-row>
      </table:table>
      <text:h text:style-name="P25" text:outline-level="1"><text:soft-page-break/>9. Roadmap Futuro</text:h>
      <text:h text:style-name="P23" text:outline-level="2">9.1 Mejoras de Datos</text:h>
      <text:list xml:id="list30633284" text:continue-numbering="true" text:style-name="WWNum2">
        <text:list-item>
          <text:p text:style-name="P27">Integración de datos de accesibilidad para usuarios con movilidad reducida.</text:p>
        </text:list-item>
        <text:list-item>
          <text:p text:style-name="P27">Información detallada sobre alergias e intolerancias en restaurantes.</text:p>
        </text:list-item>
        <text:list-item>
          <text:p text:style-name="P27">Enriquecimiento de eventos con transporte público y aparcamiento.</text:p>
        </text:list-item>
      </text:list>
      <text:h text:style-name="P23" text:outline-level="2">9.2 Expansión de Contenido</text:h>
      <text:list xml:id="list30638318" text:continue-numbering="true" text:style-name="WWNum2">
        <text:list-item>
          <text:p text:style-name="P27">Hoteles rurales y alojamientos de calidad.</text:p>
        </text:list-item>
        <text:list-item>
          <text:p text:style-name="P27">Visitas guiadas temáticas.</text:p>
        </text:list-item>
        <text:list-item>
          <text:p text:style-name="P27">Experiencias personalizadas (catas, workshops, clases de cocina).</text:p>
        </text:list-item>
      </text:list>
      <text:h text:style-name="P23" text:outline-level="2">9.3 Mejoras de Modelo</text:h>
      <text:list xml:id="list30627604" text:continue-numbering="true" text:style-name="WWNum2">
        <text:list-item>
          <text:p text:style-name="P27">Recalibración de α con datos reales de usuario.</text:p>
        </text:list-item>
        <text:list-item>
          <text:p text:style-name="P27">Incorporación de contexto temporal (estacionalidad, patrones por día de la semana).</text:p>
        </text:list-item>
        <text:list-item>
          <text:p text:style-name="P27">Bandits multibrazo para exploración/explotación.</text:p>
        </text:list-item>
        <text:list-item>
          <text:p text:style-name="P28"><text:span text:style-name="T3">Transición a la API de modelos en producción: </text:span><text:span text:style-name="T1">el contrato de la API de recomendación ya está validado de extremo a extremo contra un stub equivalente, por lo que el paso de MODEL_API_MODE = mock a http consiste únicamente en apuntar el orquestador a la API que sirve los modelos reales, sin cambios en el chatbot.</text:span></text:p>
        </text:list-item>
      </text:list>
      <text:p text:style-name="P9"/>
      <text:p text:style-name="P22">Two-Tower: la arquitectura objetivo para la parte dinámica de eventos</text:p>
      <text:p text:style-name="P8">Los eventos son contenido inherentemente dinámico: aparecen y caducan constantemente, y los más relevantes suelen ser justo los que todavía no tienen reseñas. El enfoque actual (SVD colaborativo + GradientBoosting para cold-start) cubre ese hueco con dos modelos separados; la arquitectura objetivo en producción es un modelo único de tipo Two-Tower.</text:p>
      <text:p text:style-name="P8">Cómo funciona. Son dos redes neuronales (“torres”) entrenadas a la vez. Una codifica al usuario (intereses, demografía, histórico) y otra codifica al evento (tipo, precio, mes, día de la semana, ubicación); cada una produce un vector (embedding) en un mismo espacio. La afinidad usuario–evento es el producto escalar entre ambos vectores. Los embeddings de eventos se precalculan y se indexan (búsqueda por vecinos aproximados, p. ej. FAISS), de modo que recuperar los mejores eventos para un usuario es casi instantáneo aunque haya miles.</text:p>
      <text:p text:style-name="P8">Diferencia con lo implementado. El SVD aprende factores latentes solo a partir de la matriz de reseñas: no puede puntuar un evento que no estaba en el entrenamiento, por eso hace falta el modelo de contenido aparte. El Two-Tower aprende de características, así que un evento nuevo —sin ninguna reseña— se puntúa al instante pasando sus features por la torre de eventos. Resuelve el cold-start de eventos de forma nativa y dentro de un único modelo, e integra de serie las señales temporales y de precio que hoy quedan infrautilizadas.</text:p>
      <text:p text:style-name="P8">Cómo mejoraría en producción. Recomendaría eventos desde el momento en que se publican (sin esperar a acumular reseñas), unificaría el scoring en un solo modelo (eliminando el ajuste de α y el blend de dos modelos), escalaría a catálogos grandes gracias al índice vectorial y permitiría reentrenamiento incremental a medida que llegan nuevas interacciones.</text:p>
      <text:h text:style-name="P23" text:outline-level="2"><text:soft-page-break/>9.4 Observabilidad</text:h>
      <text:list xml:id="list30625955" text:continue-numbering="true" text:style-name="WWNum2">
        <text:list-item>
          <text:p text:style-name="P27">Recolección sistemática de feedback implícito (clics, dwell time, ratings).</text:p>
        </text:list-item>
        <text:list-item>
          <text:p text:style-name="P27">Dashboards de performance por categoría y provincia.</text:p>
        </text:list-item>
        <text:list-item>
          <text:p text:style-name="P27">Framework de A/B testing para validar mejoras en producción.</text:p>
        </text:list-item>
      </text:list>
      <text:p text:style-name="P12"/>
      <text:p text:style-name="P6"/>
      <text:p text:style-name="P1"><draw:frame draw:style-name="fr1" draw:name="2" text:anchor-type="as-char" svg:width="1.667cm" svg:height="1.746cm" draw:z-index="1"><draw:image xlink:href="Pictures/10000201000002300000024C962F2501.png" xlink:type="simple" xlink:show="embed" xlink:actuate="onLoad"/></draw:frame></text:p>
      <text:p text:style-name="P4">Donde la localidad es costumb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2b2320" fo:font-size="10.5pt" fo:language="es" fo:country="ES" style:font-size-asian="10.5pt" style:language-asian="zh" style:country-asian="CN"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2b2320" style:font-name="Calibri" fo:font-size="10.5pt" fo:language="es" fo:country="ES" style:font-name-asian="Calibri2" style:font-size-asian="10.5pt" style:language-asian="zh" style:country-asian="CN" style:font-name-complex="Calibri2"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default-outline-level="" style:list-style-name=""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paragraph-properties fo:margin-top="0.6cm" fo:margin-bottom="0.282cm"/>
      <style:text-properties fo:color="#7a3b2e" style:font-name="Calibri1" fo:font-size="16pt" fo:font-weight="bold" style:font-name-asian="Calibri2" style:font-size-asian="16pt" style:font-weight-asian="bold" style:font-name-complex="Calibri2"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423cm" fo:margin-bottom="0.176cm"/>
      <style:text-properties fo:color="#a85c49" style:font-name="Calibri1" fo:font-size="12.5pt" fo:font-weight="bold" style:font-name-asian="Calibri2" style:font-size-asian="12.5pt" style:font-weight-asian="bold" style:font-name-complex="Calibri2" style:font-size-complex="12.5pt" style:font-weight-complex="bold"/>
    </style:style>
    <style:style style:name="Heading_20_3" style:display-name="Heading 3" style:family="paragraph" style:parent-style-name="Heading" style:next-style-name="Text_20_body" style:default-outline-level="3" style:list-style-name="" style:class="text">
      <style:text-properties fo:color="#1f4d78" fo:font-size="12pt" style:font-size-asian="12pt" style:font-size-complex="12pt"/>
    </style:style>
    <style:style style:name="Heading_20_4" style:display-name="Heading 4" style:family="paragraph" style:parent-style-name="Heading" style:next-style-name="Text_20_body" style:default-outline-level="4" style:list-style-name="" style:class="text">
      <style:text-properties fo:color="#2e74b5" fo:font-style="italic" style:font-style-asian="italic" style:font-style-complex="italic"/>
    </style:style>
    <style:style style:name="Heading_20_5" style:display-name="Heading 5" style:family="paragraph" style:parent-style-name="Heading" style:next-style-name="Text_20_body" style:default-outline-level="5" style:list-style-name="" style:class="text">
      <style:text-properties fo:color="#2e74b5"/>
    </style:style>
    <style:style style:name="Heading_20_6" style:display-name="Heading 6" style:family="paragraph" style:parent-style-name="Heading" style:next-style-name="Text_20_body" style:default-outline-level="6" style:list-style-name="" style:class="text">
      <style:text-properties fo:color="#1f4d78"/>
    </style:style>
    <style:style style:name="Strong_20_Emphasis" style:display-name="Strong Emphasis" style:family="paragraph" style:default-outline-level="" style:list-style-name="">
      <style:text-properties fo:font-weight="bold" style:font-weight-asian="bold" style:font-weight-complex="bold"/>
    </style:style>
    <style:style style:name="List_20_Paragraph" style:display-name="List Paragraph" style:family="paragraph" style:default-outline-level="" style:list-style-name=""/>
    <style:style style:name="footnote_20_text" style:display-name="footnote text" style:family="paragraph" style:default-outline-level="" style:list-style-name="">
      <style:paragraph-properties fo:margin-top="0cm" fo:margin-bottom="0cm" fo:line-height="100%"/>
      <style:text-properties fo:font-size="10pt" style:font-size-asian="10pt" style:font-size-complex="10pt"/>
    </style:style>
    <style:style style:name="endnote_20_text" style:display-name="endnote text" style:family="paragraph" style:default-outline-level="" style:list-style-name="">
      <style:paragraph-properties fo:margin-top="0cm" fo:margin-bottom="0cm" fo:line-height="10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reference" style:display-name="endnote reference"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text-properties fo:color="#7a3b2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459cm" fo:margin-left="0.811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named</meta:initial-creator>
    <meta:editing-cycles>3</meta:editing-cycles>
    <meta:creation-date>2026-06-09T11:11:21.70</meta:creation-date>
    <dc:date>2026-06-10T10:35:06.55</dc:date>
    <meta:generator>OpenOffice/4.1.16$Win32 OpenOffice.org_project/4116m3$Build-9816</meta:generator>
    <meta:editing-duration>PT59M44S</meta:editing-duration>
    <meta:document-statistic meta:table-count="19" meta:image-count="2" meta:object-count="0" meta:page-count="11" meta:paragraph-count="252" meta:word-count="3511" meta:character-count="22855"/>
  </office:meta>
</office:document-meta>
</file>